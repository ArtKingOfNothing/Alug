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204.89pt"/>
    </style:style>
    <style:style style:name="co4" style:family="table-column">
      <style:table-column-properties fo:break-before="auto" style:column-width="416.01pt"/>
    </style:style>
    <style:style style:name="co5" style:family="table-column">
      <style:table-column-properties fo:break-before="auto" style:column-width="1043.86pt"/>
    </style:style>
    <style:style style:name="co6" style:family="table-column">
      <style:table-column-properties fo:break-before="auto" style:column-width="408.36pt"/>
    </style:style>
    <style:style style:name="co7" style:family="table-column">
      <style:table-column-properties fo:break-before="auto" style:column-width="267.39pt"/>
    </style:style>
    <style:style style:name="co8" style:family="table-column">
      <style:table-column-properties fo:break-before="auto" style:column-width="124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kay_2c__20__20_faça_20_o_20_seguinte_2c__20_preciso_20_de_20_três_20_casos_20_de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kay,  faça o seguinte, preciso de três casos de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aso de Teste</text:p>
          </table:table-cell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Cenário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Dados de Entrada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Observaçõ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T-001</text:p>
          </table:table-cell>
          <table:table-cell table:style-name="ce1" office:value-type="string" calcext:value-type="string">
            <text:p>[RF-002] Criar Cliente</text:p>
          </table:table-cell>
          <table:table-cell table:style-name="ce1" office:value-type="string" calcext:value-type="string">
            <text:p>Cadastro de novo cliente com dados válidos</text:p>
          </table:table-cell>
          <table:table-cell table:style-name="ce1" office:value-type="string" calcext:value-type="string">
            <text:p>Usuário logado como Gerente no sistema</text:p>
          </table:table-cell>
          <table:table-cell table:style-name="ce1" office:value-type="string" calcext:value-type="string">
            <text:p>1. Usuário acessa o menu lateral 'Painel Gerencial' e clica em 'Clientes' &gt; 'Gerenciamento Clientes'.2. Usuário preenche os campos do formulário 'Novo Cliente': Nome completo, Cpf, Telefone, Email e Endereco.3. Usuário clica no botão 'inserir'.</text:p>
          </table:table-cell>
          <table:table-cell table:style-name="ce1" office:value-type="string" calcext:value-type="string">
            <text:p>Sistema limpa os campos do formulário e insere o novo registro imediatamente abaixo, na tabela 'Lista De Clientes', exibindo os dados inseridos.</text:p>
          </table:table-cell>
          <table:table-cell table:style-name="ce1" office:value-type="string" calcext:value-type="string">
            <text:p>A Testar</text:p>
          </table:table-cell>
          <table:table-cell table:style-name="ce1" office:value-type="string" calcext:value-type="string">
            <text:p>Tela Gerenciamento de clientes</text:p>
          </table:table-cell>
          <table:table-cell table:style-name="ce1" office:value-type="string" calcext:value-type="string">
            <text:p>Fluxo Principal - Ciclo 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T-002</text:p>
          </table:table-cell>
          <table:table-cell table:style-name="ce1" office:value-type="string" calcext:value-type="string">
            <text:p>Listar Reservas</text:p>
          </table:table-cell>
          <table:table-cell table:style-name="ce1" office:value-type="string" calcext:value-type="string">
            <text:p>Visualização de todas as reservas cadastradas</text:p>
          </table:table-cell>
          <table:table-cell table:style-name="ce1" office:value-type="string" calcext:value-type="string">
            <text:p>Usuário logado como Gerente no sistema / Existir ao menos uma reserva previamente cadastrada</text:p>
          </table:table-cell>
          <table:table-cell table:style-name="ce1" office:value-type="string" calcext:value-type="string">
            <text:p>1. Usuário acessa o menu lateral 'Painel Gerencial' e clica em 'Reservas' &gt; 'Gerenciamento Reservas'.2. Usuário rola a tela até a seção 'Lista De Reservas'.</text:p>
          </table:table-cell>
          <table:table-cell table:style-name="ce1" office:value-type="string" calcext:value-type="string">
            <text:p>Sistema exibe uma tabela contendo as colunas '#', 'cliente', 'espaco', 'data', 'convidados', 'valor' e 'acoes' com todos os registros ativos de reservas no banco de dados.</text:p>
          </table:table-cell>
          <table:table-cell table:style-name="ce1" office:value-type="string" calcext:value-type="string">
            <text:p>A Testar</text:p>
          </table:table-cell>
          <table:table-cell table:style-name="ce1" office:value-type="string" calcext:value-type="string">
            <text:p>Tela Gerenciamento de Reservas</text:p>
          </table:table-cell>
          <table:table-cell table:style-name="ce1" office:value-type="string" calcext:value-type="string">
            <text:p>Fluxo Principal - Ciclo 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T-003</text:p>
          </table:table-cell>
          <table:table-cell table:style-name="ce1" office:value-type="string" calcext:value-type="string">
            <text:p>[RF-023] Consultar Espaços</text:p>
          </table:table-cell>
          <table:table-cell table:style-name="ce1" office:value-type="string" calcext:value-type="string">
            <text:p>Visualização da grade de espaços disponíveis</text:p>
          </table:table-cell>
          <table:table-cell table:style-name="ce1" office:value-type="string" calcext:value-type="string">
            <text:p>Usuário logado no sistema / Existir espaços previamente cadastrados no sistema</text:p>
          </table:table-cell>
          <table:table-cell table:style-name="ce1" office:value-type="string" calcext:value-type="string">
            <text:p>1. Usuário acessa o menu lateral principal e clica em 'Espaços' &gt; 'Espaços'.2. Usuário visualiza os cards na seção 'Espaços Populares' e a grade geral.</text:p>
          </table:table-cell>
          <table:table-cell table:style-name="ce1" office:value-type="string" calcext:value-type="string">
            <text:p>Sistema retorna a tela de exibição de espaços, apresentando os cards com foto, nome, valor por dia e capacidade máxima, além do campo 'Pesquisar Espaço'.</text:p>
          </table:table-cell>
          <table:table-cell table:style-name="ce1" office:value-type="string" calcext:value-type="string">
            <text:p>A Testar</text:p>
          </table:table-cell>
          <table:table-cell table:style-name="ce1" office:value-type="string" calcext:value-type="string">
            <text:p>Tela de Espaços</text:p>
          </table:table-cell>
          <table:table-cell table:style-name="ce1" office:value-type="string" calcext:value-type="string">
            <text:p>Fluxo Principal - Ciclo 1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kay_2c__20__20_faça_20_o_20_seguinte_2c__20_preciso_20_de_20_três_20_casos_20_de..." style:display-name="PageStyle_Okay,  faça o seguinte, preciso de três casos de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